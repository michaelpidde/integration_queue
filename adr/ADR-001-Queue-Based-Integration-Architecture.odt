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1.5271in"/>
    </style:style>
    <style:style style:name="Table1.B" style:family="table-column">
      <style:table-column-properties style:column-width="4.97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2fa" fo:padding-left="0.0833in" fo:padding-right="0.0833in" fo:padding-top="0.0556in" fo:padding-bottom="0.0556in" fo:border="0.1pt solid #cccccc">
        <style:background-image/>
      </style:table-cell-properties>
    </style:style>
    <style:style style:name="Table1.B1" style:family="table-cell">
      <style:table-cell-properties fo:padding-left="0.0833in" fo:padding-right="0.0833in" fo:padding-top="0.0556in" fo:padding-bottom="0.0556in" fo:border="0.1pt solid #cccccc"/>
    </style:style>
    <style:style style:name="Table1.B2" style:family="table-cell">
      <style:table-cell-properties fo:padding-left="0.0833in" fo:padding-right="0.0833in" fo:padding-top="0.0556in" fo:padding-bottom="0.0556in" fo:border="0.1pt solid #cccccc"/>
    </style:style>
    <style:style style:name="Table1.B3" style:family="table-cell">
      <style:table-cell-properties fo:padding-left="0.0833in" fo:padding-right="0.0833in" fo:padding-top="0.0556in" fo:padding-bottom="0.0556in" fo:border="0.1pt solid #cccccc"/>
    </style:style>
    <style:style style:name="Table1.B4" style:family="table-cell">
      <style:table-cell-properties fo:padding-left="0.0833in" fo:padding-right="0.0833in" fo:padding-top="0.0556in" fo:padding-bottom="0.0556in" fo:border="0.1pt solid #cccccc"/>
    </style:style>
    <style:style style:name="Table1.B5" style:family="table-cell">
      <style:table-cell-properties fo:padding-left="0.0833in" fo:padding-right="0.0833in" fo:padding-top="0.0556in" fo:padding-bottom="0.0556in" fo:border="0.1pt solid #cccccc"/>
    </style:style>
    <style:style style:name="Table1.B6" style:family="table-cell">
      <style:table-cell-properties fo:padding-left="0.0833in" fo:padding-right="0.0833in" fo:padding-top="0.0556in" fo:padding-bottom="0.0556in" fo:border="0.1pt solid #cccccc"/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e5fac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5f7fb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e5fac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5f7fb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Standard">
      <style:paragraph-properties fo:margin-top="0in" fo:margin-bottom="0.0555in" style:contextual-spacing="false"/>
    </style:style>
    <style:style style:name="P2" style:family="paragraph" style:parent-style-name="Standard">
      <style:paragraph-properties fo:margin-top="0in" fo:margin-bottom="0.139in" style:contextual-spacing="false"/>
    </style:style>
    <style:style style:name="P3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51pt solid #2e5fac"/>
    </style:style>
    <style:style style:name="P4" style:family="paragraph" style:parent-style-name="Standard">
      <style:paragraph-properties fo:margin-top="0.0555in" fo:margin-bottom="0.0555in" style:contextual-spacing="false"/>
    </style:style>
    <style:style style:name="P5" style:family="paragraph" style:parent-style-name="Heading_20_2">
      <style:paragraph-properties fo:margin-top="0.2083in" fo:margin-bottom="0.0835in" style:contextual-spacing="false"/>
    </style:style>
    <style:style style:name="P6" style:family="paragraph" style:parent-style-name="Standard">
      <style:paragraph-properties fo:margin-top="0.139in" fo:margin-bottom="0.0555in" style:contextual-spacing="false"/>
    </style:style>
    <style:style style:name="P7" style:family="paragraph" style:parent-style-name="List_20_Paragraph" style:list-style-name="WWNum2">
      <style:paragraph-properties fo:margin-top="0.028in" fo:margin-bottom="0.028in" style:contextual-spacing="false"/>
    </style:style>
    <style:style style:name="T1" style:family="text">
      <style:text-properties fo:color="#888888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" fo:font-size="10pt" style:font-name-asian="Arial2" style:font-size-asian="10pt" style:font-name-complex="Arial2" style:font-size-complex="10pt"/>
    </style:style>
    <style:style style:name="T5" style:family="text">
      <style:text-properties fo:color="#2e5fac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6" style:family="text">
      <style:text-properties style:font-name="Arial" fo:font-size="11pt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chitecture Decision Record</text:span></text:p>
      <text:p text:style-name="P2"><text:span text:style-name="T2">ADR-001: Queue-Based Integration Architecture with Immutable Source Data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3">Status</text:span></text:p>
          </table:table-cell>
          <table:table-cell table:style-name="Table1.B1" office:value-type="string">
            <text:p text:style-name="Standard"><text:span text:style-name="T4">Proposed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Date</text:span></text:p>
          </table:table-cell>
          <table:table-cell table:style-name="Table1.B2" office:value-type="string">
            <text:p text:style-name="Standard"><text:span text:style-name="T4">June 28, 2026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Author</text:span></text:p>
          </table:table-cell>
          <table:table-cell table:style-name="Table1.B3" office:value-type="string">
            <text:p text:style-name="Standard"><text:span text:style-name="T4">Michael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Project</text:span></text:p>
          </table:table-cell>
          <table:table-cell table:style-name="Table1.B4" office:value-type="string">
            <text:p text:style-name="Standard"><text:span text:style-name="T4">PiddeCorp Integration Queue Pilo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Deciders</text:span></text:p>
          </table:table-cell>
          <table:table-cell table:style-name="Table1.B5" office:value-type="string">
            <text:p text:style-name="Standard"><text:span text:style-name="T4">Michael (proposed); pending team/EA review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Supersedes</text:span></text:p>
          </table:table-cell>
          <table:table-cell table:style-name="Table1.B6" office:value-type="string">
            <text:p text:style-name="Standard"><text:span text:style-name="T4">N/A</text:span></text:p>
          </table:table-cell>
        </table:table-row>
      </table:table>
      <text:p text:style-name="P4"/>
      <text:p text:style-name="P3"/>
      <text:h text:style-name="P5" text:outline-level="2"><text:span text:style-name="T5">Context</text:span></text:h>
      <text:p text:style-name="P4"><text:span text:style-name="T6">The PiddeCorp integration pilot explores an architecture for ingesting task data from external source systems and making it available to downstream consumers. The core challenge is designing a reliable, maintainable data flow that preserves fidelity to the source system while supporting downstream workflow state management.</text:span></text:p>
      <text:p text:style-name="P4"/>
      <text:p text:style-name="P4"><text:span text:style-name="T6">The incumbent approach at the organization uses an integration layer database that receives data from source systems, then synchronizes records to a UI layer database via a cron job that POSTs records to an API endpoint. Upon a 200 response, the integration layer marks records as synced. This introduces bidirectional state concerns and a synchronization dependency between layers.</text:span></text:p>
      <text:p text:style-name="P4"/>
      <text:p text:style-name="P4"><text:span text:style-name="T6">This ADR documents the architectural decisions made for the pilot project, which proposes an alternative approach.</text:span></text:p>
      <text:p text:style-name="P4"/>
      <text:p text:style-name="P3"/>
      <text:h text:style-name="P5" text:outline-level="2"><text:span text:style-name="T5">Decisions</text:span></text:h>
      <text:p text:style-name="P6"><text:span text:style-name="T7">1. Queue-Based Ingestion Over Integration Layer Sync</text:span></text:p>
      <text:p text:style-name="P4"><text:span text:style-name="T6">Source systems publish typed messages directly to a RabbitMQ queue. Consumers subscribe to the queue and process messages as they arrive. This eliminates the integration layer database and the cron-based synchronization mechanism entirely.</text:span></text:p>
      <text:p text:style-name="P4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Standard"><text:span text:style-name="T8">Consideration</text:span></text:p>
          </table:table-cell>
          <table:table-cell table:style-name="Table2.A1" office:value-type="string">
            <text:p text:style-name="Standard"><text:span text:style-name="T8">Proposed (Queue-Based)</text:span></text:p>
          </table:table-cell>
          <table:table-cell table:style-name="Table2.A1" office:value-type="string">
            <text:p text:style-name="Standard"><text:span text:style-name="T8">Incumbent (Cron Sync)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Standard"><text:span text:style-name="T4">Coupling</text:span></text:p>
          </table:table-cell>
          <table:table-cell table:style-name="Table2.A2" office:value-type="string">
            <text:p text:style-name="Standard"><text:span text:style-name="T4">Loose — producer and consumer decoupled via queue</text:span></text:p>
          </table:table-cell>
          <table:table-cell table:style-name="Table2.A2" office:value-type="string">
            <text:p text:style-name="Standard"><text:span text:style-name="T4">Tight — consumer must expose API endpoint; producer must await 200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4">Delivery guarantee</text:span></text:p>
          </table:table-cell>
          <table:table-cell table:style-name="Table2.A3" office:value-type="string">
            <text:p text:style-name="Standard"><text:span text:style-name="T4">RabbitMQ durability + consumer ACK</text:span></text:p>
          </table:table-cell>
          <table:table-cell table:style-name="Table2.A3" office:value-type="string">
            <text:p text:style-name="Standard"><text:span text:style-name="T4">Dependent on cron schedule and HTTP reliability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4">Sync state</text:span></text:p>
          </table:table-cell>
          <table:table-cell table:style-name="Table2.A2" office:value-type="string">
            <text:p text:style-name="Standard"><text:span text:style-name="T4">Not required — successful enqueue implies eventual delivery</text:span></text:p>
          </table:table-cell>
          <table:table-cell table:style-name="Table2.A2" office:value-type="string">
            <text:p text:style-name="Standard"><text:span text:style-name="T4">Required — Synced flag and timestamp must be maintained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4">Failure handling</text:span></text:p>
          </table:table-cell>
          <table:table-cell table:style-name="Table2.A3" office:value-type="string">
            <text:p text:style-name="Standard"><text:span text:style-name="T4">Messages requeue on consumer failure</text:span></text:p>
          </table:table-cell>
          <table:table-cell table:style-name="Table2.A3" office:value-type="string">
            <text:p text:style-name="Standard"><text:span text:style-name="T4">Failed POSTs must be retried by cron on next cycle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4">Scalability</text:span></text:p>
          </table:table-cell>
          <table:table-cell table:style-name="Table2.A2" office:value-type="string">
            <text:p text:style-name="Standard"><text:span text:style-name="T4">Multiple consumers can process concurrently</text:span></text:p>
          </table:table-cell>
          <table:table-cell table:style-name="Table2.A2" office:value-type="string">
            <text:p text:style-name="Standard"><text:span text:style-name="T4">Cron job is a single-threaded synchronous sweep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4">Complexity</text:span></text:p>
          </table:table-cell>
          <table:table-cell table:style-name="Table2.A3" office:value-type="string">
            <text:p text:style-name="Standard"><text:span text:style-name="T4">Queue infrastructure required</text:span></text:p>
          </table:table-cell>
          <table:table-cell table:style-name="Table2.A3" office:value-type="string">
            <text:p text:style-name="Standard"><text:span text:style-name="T4">HTTP API contract between layers required</text:span></text:p>
          </table:table-cell>
        </table:table-row>
      </table:table>
      <text:p text:style-name="P4"/>
      <text:p text:style-name="P6"><text:span text:style-name="T7">2. Immutable Source Data</text:span></text:p>
      <text:p text:style-name="P4"><text:span text:style-name="T6">Records sourced from the queue are written once and never updated. The OpenTask table and its subtype tables (Todo, HoneyDo, MountainDew) are insert-only. This preserves fidelity to the source system of record and prevents drift between what was received and what is stored.</text:span></text:p>
      <text:p text:style-name="P4"/>
      <text:p text:style-name="P4"><text:span text:style-name="T6">Immutability is enforced at the database level by denying UPDATE and DELETE permissions to the application database user.</text:span></text:p>
      <text:p text:style-name="P4"/>
      <text:p text:style-name="P6"><text:span text:style-name="T7">3. Separate Workflow State Table</text:span></text:p>
      <text:p text:style-name="P4"><text:span text:style-name="T6">Mutable workflow concerns — status, user assignment, timestamps, audit trail — are captured in a separate OpenItemWorkflow table that references OpenTask by foreign key. This cleanly separates sourced facts from operational state, allowing either to evolve independently.</text:span></text:p>
      <text:p text:style-name="P4"/>
      <text:p text:style-name="P4"><text:span text:style-name="T6">TodoItem completion state follows the same principle: a TodoItemStatus table tracks completion per item rather than adding a mutable flag to the immutable TodoItem record. This also provides a natural audit trail of when and by whom each item was completed.</text:span></text:p>
      <text:p text:style-name="P4"/>
      <text:p text:style-name="P6"><text:span text:style-name="T7">4. Typed Contracts NuGet Library</text:span></text:p>
      <text:p text:style-name="P4"><text:span text:style-name="T6">A shared contracts library (PiddeCorp.Integrations.Contracts) is distributed as a NuGet package and referenced by both producers and consumers. It defines the message types, the TaskType enum, and encapsulates serialization and deserialization logic, including two-pass deserialization to resolve the concrete TaskData subtype.</text:span></text:p>
      <text:p text:style-name="P4"/>
      <text:p text:style-name="P4"><text:span text:style-name="T6">This ensures producers and consumers share a common, versioned understanding of message structure without duplicating type definitions or serialization logic. The library owns the queue name as a constant on each message type, eliminating hardcoded strings at both ends.</text:span></text:p>
      <text:p text:style-name="P4"/>
      <text:p text:style-name="P4"><text:soft-page-break/><text:span text:style-name="T6">Contracts are versioned by namespace (V1, V2, etc.) to support non-breaking coexistence of multiple contract versions within the same package.</text:span></text:p>
      <text:p text:style-name="P4"/>
      <text:p text:style-name="P6"><text:span text:style-name="T7">5. Class Table Inheritance for Subtype Persistence</text:span></text:p>
      <text:p text:style-name="P4"><text:span text:style-name="T6">The three task subtypes (Todo, HoneyDo, MountainDew) are persisted in separate tables sharing a foreign key reference to the OpenTask table. This avoids nullable FK columns on OpenTask and maps cleanly to the object model where each subtype has a distinct shape.</text:span></text:p>
      <text:p text:style-name="P4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Standard"><text:span text:style-name="T8">Approach</text:span></text:p>
          </table:table-cell>
          <table:table-cell table:style-name="Table3.A1" office:value-type="string">
            <text:p text:style-name="Standard"><text:span text:style-name="T8">Description</text:span></text:p>
          </table:table-cell>
          <table:table-cell table:style-name="Table3.A1" office:value-type="string">
            <text:p text:style-name="Standard"><text:span text:style-name="T8">Tradeoff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4">Class Table Inheritance (chosen)</text:span></text:p>
          </table:table-cell>
          <table:table-cell table:style-name="Table3.A2" office:value-type="string">
            <text:p text:style-name="Standard"><text:span text:style-name="T4">Separate table per subtype; FK references OpenTask</text:span></text:p>
          </table:table-cell>
          <table:table-cell table:style-name="Table3.A2" office:value-type="string">
            <text:p text:style-name="Standard"><text:span text:style-name="T4">Clean schema, no nulls, requires JOIN to hydrate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4">Single Table Inheritance</text:span></text:p>
          </table:table-cell>
          <table:table-cell table:style-name="Table3.A3" office:value-type="string">
            <text:p text:style-name="Standard"><text:span text:style-name="T4">All subtypes in one table with nullable columns</text:span></text:p>
          </table:table-cell>
          <table:table-cell table:style-name="Table3.A3" office:value-type="string">
            <text:p text:style-name="Standard"><text:span text:style-name="T4">Simple queries, but nullable columns and sparse rows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4">Nullable FKs on OpenTask</text:span></text:p>
          </table:table-cell>
          <table:table-cell table:style-name="Table3.A2" office:value-type="string">
            <text:p text:style-name="Standard"><text:span text:style-name="T4">OpenTask holds optional FK per subtype</text:span></text:p>
          </table:table-cell>
          <table:table-cell table:style-name="Table3.A2" office:value-type="string">
            <text:p text:style-name="Standard"><text:span text:style-name="T4">Only one populated at a time; no schema enforcement</text:span></text:p>
          </table:table-cell>
        </table:table-row>
      </table:table>
      <text:p text:style-name="P4"/>
      <text:p text:style-name="P3"/>
      <text:h text:style-name="P5" text:outline-level="2"><text:span text:style-name="T5">Consequences</text:span></text:h>
      <text:p text:style-name="P6"><text:span text:style-name="T7">Positive</text:span></text:p>
      <text:list text:style-name="WWNum2">
        <text:list-item text:start-value="1">
          <text:p text:style-name="P7"><text:span text:style-name="T6">Producers and consumers are fully decoupled — neither needs to know the other exists</text:span></text:p>
        </text:list-item>
        <text:list-item>
          <text:p text:style-name="P7"><text:span text:style-name="T6">Source data fidelity is guaranteed by immutability enforcement at the database level</text:span></text:p>
        </text:list-item>
        <text:list-item>
          <text:p text:style-name="P7"><text:span text:style-name="T6">Workflow state can evolve independently of sourced data without schema changes to core tables</text:span></text:p>
        </text:list-item>
        <text:list-item>
          <text:p text:style-name="P7"><text:span text:style-name="T6">Shared contracts library reduces duplication and provides a single versioned source of truth for message structure</text:span></text:p>
        </text:list-item>
        <text:list-item>
          <text:p text:style-name="P7"><text:span text:style-name="T6">Queue-based delivery provides natural retry and durability semantics without custom sync logic</text:span></text:p>
        </text:list-item>
      </text:list>
      <text:p text:style-name="P4"/>
      <text:p text:style-name="P6"><text:span text:style-name="T7">Negative / Tradeoffs</text:span></text:p>
      <text:list text:continue-numbering="true" text:style-name="WWNum2">
        <text:list-item>
          <text:p text:style-name="P7"><text:span text:style-name="T6">RabbitMQ infrastructure must be provisioned and maintained</text:span></text:p>
        </text:list-item>
        <text:list-item>
          <text:p text:style-name="P7"><text:span text:style-name="T6">Two-pass deserialization adds internal complexity to the contracts library, though this is fully encapsulated from consumers</text:span></text:p>
        </text:list-item>
        <text:list-item>
          <text:p text:style-name="P7"><text:span text:style-name="T6">Class table inheritance requires JOINs to hydrate a full task record</text:span></text:p>
        </text:list-item>
        <text:list-item>
          <text:p text:style-name="P7"><text:span text:style-name="T6">Insert-only enforcement adds a layer of database configuration that must be maintained across environments</text:span></text:p>
        </text:list-item>
      </text:list>
      <text:p text:style-name="P4"/>
      <text:p text:style-name="P3"/>
      <text:h text:style-name="P5" text:outline-level="2"><text:soft-page-break/><text:span text:style-name="T5">Alternatives Considered</text:span></text:h>
      <text:p text:style-name="P4"><text:span text:style-name="T6">The incumbent cron-based synchronization approach was considered and rejected for this pilot on the following grounds:</text:span></text:p>
      <text:list text:continue-numbering="true" text:style-name="WWNum2">
        <text:list-item>
          <text:p text:style-name="P7"><text:span text:style-name="T6">Introduces accidental complexity in the form of a Synced flag and sync timestamp that exist solely to manage the synchronization mechanism, not to represent domain state</text:span></text:p>
        </text:list-item>
        <text:list-item>
          <text:p text:style-name="P7"><text:span text:style-name="T6">Creates bidirectional coupling between the integration layer and the UI layer — the UI layer must expose an API endpoint whose contract the integration layer depends on</text:span></text:p>
        </text:list-item>
        <text:list-item>
          <text:p text:style-name="P7"><text:span text:style-name="T6">Failure modes are less deterministic — a failed POST must wait for the next cron cycle to retry, with no queue-based durability guarantee</text:span></text:p>
        </text:list-item>
        <text:list-item>
          <text:p text:style-name="P7"><text:span text:style-name="T6">The intermediary integration layer database is an additional persistence concern that exists solely to facilitate the sync, not to serve a domain purpose</text:span></text:p>
        </text:list-item>
      </text:list>
      <text:p text:style-name="P4"/>
      <text:p text:style-name="P3"/>
      <text:h text:style-name="P5" text:outline-level="2"><text:span text:style-name="T5">Notes</text:span></text:h>
      <text:p text:style-name="P4"><text:span text:style-name="T6">This ADR was authored mid-project as a retrospective documentation of decisions made during the pilot. It reflects the proposed architecture as implemented in the pilot, not a decision ratified through a formal review process. It is intended to serve as a reference artifact and a basis for future architectural proposal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25in" fo:margin-bottom="0.139in" style:contextual-spacing="false"/>
      <style:text-properties fo:color="#1f3864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2083in" fo:margin-bottom="0.0835in" style:contextual-spacing="false"/>
      <style:text-properties fo:color="#2e5fac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6-28T19:03:50.342000000</meta:creation-date>
    <dc:date>2026-06-28T14:16:31.550874700</dc:date>
    <meta:editing-duration>PT51S</meta:editing-duration>
    <meta:generator>LibreOffice/25.2.7.2$Windows_X86_64 LibreOffice_project/5cbfd1ab6520636bb5f7b99185aa69bd7456825d</meta:generator>
    <meta:document-statistic meta:table-count="3" meta:image-count="0" meta:object-count="0" meta:page-count="4" meta:paragraph-count="86" meta:word-count="947" meta:character-count="6488" meta:non-whitespace-character-count="5631"/>
  </office:meta>
</office:document-meta>
</file>